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fo:background-color="#595959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8069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3" table:style-name="ta1">
        <table:table-column table:style-name="co1" table:number-columns-repeated="52" table:default-cell-style-name="ce1"/>
        <table:table-column table:style-name="co2" table:default-cell-style-name="ce1"/>
        <table:table-column table:style-name="co1" table:number-columns-repeated="16331" table:default-cell-style-name="ce1"/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7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style-name="ce3"/>
          <table:table-cell office:value-type="float" office:value="1" table:style-name="ce3">
            <text:p>1</text:p>
          </table:table-cell>
          <table:table-cell table:number-columns-repeated="6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4" table:style-name="ce3"/>
          <table:table-cell table:number-columns-repeated="1632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10" table:style-name="ce3"/>
          <table:table-cell office:value-type="float" office:value="12" table:style-name="ce3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3">
            <text:p>12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10"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number-columns-repeated="5" table:style-name="ce3"/>
          <table:table-cell table:number-columns-repeated="16326"/>
        </table:table-row>
        <table:table-row table:style-name="ro1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style-name="ro1"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style-name="ro1"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2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style-name="ro1"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style-name="ro1"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number-rows-repeated="2" table:style-name="ro1">
          <table:table-cell table:number-columns-repeated="1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2" table:style-name="ce3"/>
          <table:table-cell table:number-columns-repeated="16326"/>
        </table:table-row>
        <table:table-row table:style-name="ro1">
          <table:table-cell table:number-columns-repeated="1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0" table:style-name="ce1"/>
        </table:table-row>
        <table:table-row table:number-rows-repeated="2" table:style-name="ro1">
          <table:table-cell table:number-columns-repeated="1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Benny Bostock</meta:initial-creator>
    <dc:creator>Benny Bostock</dc:creator>
    <meta:creation-date>2026-06-29T14:40:12Z</meta:creation-date>
    <dc:date>2026-06-29T15:30:30Z</dc:date>
  </office:meta>
</office:document-meta>
</file>