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93939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background-color="#00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fo:background-color="#808080"/>
    </style:style>
    <style:style style:name="ce7" style:family="table-cell" style:parent-style-name="Default" style:data-style-name="N0">
      <style:table-cell-properties fo:background-color="#FF00FF"/>
    </style:style>
    <style:style style:name="ce8" style:family="table-cell" style:parent-style-name="Default" style:data-style-name="N0">
      <style:table-cell-properties fo:background-color="#7030A0"/>
    </style:style>
    <style:style style:name="co1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p1" table:style-name="ta1">
        <table:table-column table:style-name="co1" table:number-columns-repeated="16384" table:default-cell-style-name="ce1"/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6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6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61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Benny Bostock</meta:initial-creator>
    <dc:creator>Benny Bostock</dc:creator>
    <meta:creation-date>2026-06-29T15:00:06Z</meta:creation-date>
    <dc:date>2026-06-29T15:51:23Z</dc:date>
  </office:meta>
</office:document-meta>
</file>