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FF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#ADADAD"/>
    </style:style>
    <style:style style:name="ce5" style:family="table-cell" style:parent-style-name="Default" style:data-style-name="N0">
      <style:table-cell-properties fo:background-color="#44B3E1"/>
    </style:style>
    <style:style style:name="ce6" style:family="table-cell" style:parent-style-name="Default" style:data-style-name="N0">
      <style:table-cell-properties fo:background-color="#002060"/>
    </style:style>
    <style:style style:name="ce7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2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number-rows-repeated="2"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7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Benny Bostock</meta:initial-creator>
    <dc:creator>Benny Bostock</dc:creator>
    <meta:creation-date>2026-06-29T16:05:33Z</meta:creation-date>
    <dc:date>2026-06-29T16:06:50Z</dc:date>
  </office:meta>
</office:document-meta>
</file>